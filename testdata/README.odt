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text-properties officeooo:paragraph-rsid="0011068a"/>
    </style:style>
    <style:style style:name="P7" style:family="paragraph" style:parent-style-name="Text_20_body" style:list-style-name="L5"/>
    <style:style style:name="T1" style:family="text">
      <style:text-properties fo:font-weight="bold"/>
    </style:style>
    <style:style style:name="T2" style:family="text">
      <style:text-properties officeooo:rsid="0011068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tenna App</text:h>
      <text:p text:style-name="Text_20_body"><text:span text:style-name="T1">antenna</text:span> is a text (terminal) based feed oriented content management tool. It let's you create, curate and render simple websites, micro blogs, blogs, link blogs and personal news sites using Markdown. It runs interactively by default but is also easily scripted for command line use. A novel feature is its support for both inbound and outbound RSS feeds with integrated Markdown content via the RSS 2.0 source name space. It was inspired by Dave Winer's <text:a xlink:type="simple" xlink:href="https://textcasting.org/" text:style-name="Internet_20_link" text:visited-style-name="Visited_20_Internet_20_Link">Textcasting</text:a> concept. It grew out of my experimental personal <text:s/>news website, <text:a xlink:type="simple" xlink:href="https://rsdoiel.github.io/antenna" text:style-name="Internet_20_link" text:visited-style-name="Visited_20_Internet_20_Link">antenna</text:a>. Antenna App is intended to make it possible to return to a simple web. The goal is to make it easy for writers create web sites with only a knowledge of Markdown. This can enable writers to create publically or privately available websites with little more than their favorite text editor and Antenna App.</text:p>
      <text:p text:style-name="Text_20_body">Antenna App's Features:</text:p>
      <text:list text:style-name="L1">
        <text:list-item>
          <text:p text:style-name="P1">An interactive text and scriptable command line interfaces</text:p>
        </text:list-item>
        <text:list-item>
          <text:p text:style-name="P1">Pages and posts are written using Markdown</text:p>
        </text:list-item>
        <text:list-item>
          <text:p text:style-name="P1">Posts are automatically included in an RSS feed for your site</text:p>
        </text:list-item>
        <text:list-item>
          <text:p text:style-name="P1">Aggregations of feeds can be included by providing Markdown list of links to RSS, Atom and JSON feeds</text:p>
        </text:list-item>
        <text:list-item>
          <text:p text:style-name="P1">Pages, posts and aggregations <text:span text:style-name="T1">can include</text:span> metadata expressed as YAML front matter<text:note text:id="ftn0" text:note-class="footnote"><text:note-citation>1</text:note-citation><text:note-body><text:p text:style-name="Footnote">YAML is a simple notation describing structured data. Front matter is a block of text holding metadata about the document. Using YAML Front Matter is a common practice in the Markdown community. I first encountered it in the data science community and other scholarly science communities.</text:p></text:note-body></text:note></text:p>
        </text:list-item>
        <text:list-item>
          <text:p text:style-name="P1">Local posts can be added to curated feed collection (introducing a distributed option for <text:span text:style-name="T1">opt in</text:span> conversations)</text:p>
        </text:list-item>
        <text:list-item>
          <text:p text:style-name="P1">You can have multiple collections of feeds</text:p>
        </text:list-item>
        <text:list-item>
          <text:p text:style-name="P1">Feed collections can be harvested individually or collectively</text:p>
        </text:list-item>
        <text:list-item>
          <text:p text:style-name="P1">The managed content is stored in SQLite3 database(s)</text:p>
        </text:list-item>
        <text:list-item>
          <text:p text:style-name="P2">HTML, RSS 2.0, OPML and sitemap.xml documents are automatically generated without additional configuration</text:p>
          <text:list>
            <text:list-item>
              <text:p text:style-name="P1">HTML files are generated for each post, page and aggregation in each collection</text:p>
            </text:list-item>
          </text:list>
        </text:list-item>
        <text:list-item>
          <text:p text:style-name="P1">A preview web service is provided to view the render content in your web browser via a localhost URL</text:p>
        </text:list-item>
        <text:list-item>
          <text:p text:style-name="P2">Site customization is possible through the use of page generators</text:p>
          <text:list>
            <text:list-item>
              <text:p text:style-name="P1">Page generators are YAML files describing basic elements of a page like <text:s/>header, navigation, before/after content section, footer</text:p>
            </text:list-item>
            <text:list-item>
              <text:p text:style-name="P2">Custom page generators are composed by apply "themes" allowing customized Markdown and CSS to be shared</text:p>
              <text:list>
                <text:list-item>
                  <text:p text:style-name="P1"><text:soft-page-break/>Themes are a directory populated with Markdown files describing each element of the theme<text:note text:id="ftn1" text:note-class="footnote"><text:note-citation>2</text:note-citation><text:note-body><text:p text:style-name="Footnote">A YAML file called head.yaml is used to describe custom meta, link and script elements in the page. There is a style.css file that can be included in a theme to be included in the head element of rendered HTML.</text:p></text:note-body></text:note></text:p>
                </text:list-item>
              </text:list>
            </text:list-item>
            <text:list-item>
              <text:p text:style-name="P1">YAML is a simple notation describing struct<text:span text:style-name="T2">ur</text:span>ed data. Front matter is a block of text hodling metadata about the document. Using YAML Front Matter is a common practice in the Markdown community. I first encountered it in the data science community and other scholarly science communities. Each collection can have it's own page generator and theme</text:p>
            </text:list-item>
          </text:list>
        </text:list-item>
        <text:list-item>
          <text:p text:style-name="P1">Antenna App plays well with other static website tools (e.g. PageFind)</text:p>
        </text:list-item>
      </text:list>
      <text:p text:style-name="Text_20_body"/>
      <text:p text:style-name="Text_20_body">The combined features of Antenna App go beyond most static site generators. It provides a means of making collaborative website through the ability to import feeds from one or more people. You can add your own Markdown content to a feed allowing for commentary in a specific feed collection. Feed orientation allows Antenna App sites to be social without turning over autonomy of our content to another site.</text:p>
      <text:p text:style-name="Text_20_body">I believe Antenna App is well suited for creating local community sites where each contributed produces a feed of articles that are then linked from a common website. This could be used for aggregating content of special interest groups or for local neighborhood news sites. The site doing the aggregation can control those feed items to be published allowing for editorial control. Since this runs on your computer you don't need to run specialized services hosted on the public web. You get the flexibility of a dynamic system with the low overhead and high availability provided by static websites.</text:p>
      <text:h text:style-name="Heading_20_3" text:outline-level="3">Authors</text:h>
      <text:list text:style-name="L2">
        <text:list-item>
          <text:p text:style-name="P3">Doiel, R. S.</text:p>
        </text:list-item>
      </text:list>
      <text:h text:style-name="Heading_20_2" text:outline-level="2" text:is-list-header="true">Software Requirements</text:h>
      <text:p text:style-name="Text_20_body">To run Antenna App you just need to <text:a xlink:type="simple" xlink:href="../../INSTALL.md" text:style-name="Internet_20_link" text:visited-style-name="Visited_20_Internet_20_Link">install</text:a> it on a Raspberry Pi, Linux, macOS or Windows computer.</text:p>
      <text:p text:style-name="Text_20_body">Requirements top compile the Antenna App from source code.</text:p>
      <text:list text:style-name="L3">
        <text:list-item>
          <text:p text:style-name="P4">Go &gt;= 1.2<text:span text:style-name="T2">6</text:span>.<text:span text:style-name="T2">2</text:span></text:p>
        </text:list-item>
      </text:list>
      <text:h text:style-name="Heading_20_3" text:outline-level="3" text:is-list-header="true">Software Suggestions</text:h>
      <text:p text:style-name="Text_20_body">The following are helpful if you want to develop or customize the Antenna App software.</text:p>
      <text:list text:style-name="L4">
        <text:list-item>
          <text:p text:style-name="P5">GNU Make &gt;= 3.4</text:p>
        </text:list-item>
        <text:list-item>
          <text:p text:style-name="P5">Pandoc &gt;= 3.1</text:p>
        </text:list-item>
        <text:list-item>
          <text:p text:style-name="P6">CMTools &gt;= 0.0.40</text:p>
        </text:list-item>
        <text:list-item>
          <text:p text:style-name="P5"><text:soft-page-break/>Bash or Power<text:span text:style-name="T2">s</text:span>hell</text:p>
        </text:list-item>
      </text:list>
      <text:h text:style-name="Heading_20_2" text:outline-level="2" text:is-list-header="true">Related resources</text:h>
      <text:list text:style-name="L5">
        <text:list-item>
          <text:p text:style-name="P7"><text:a xlink:type="simple" xlink:href="https://github.com/rsdoiel/antennaApp/issues" text:style-name="Internet_20_link" text:visited-style-name="Visited_20_Internet_20_Link">Getting Help, Reporting bugs</text:a></text:p>
        </text:list-item>
        <text:list-item>
          <text:p text:style-name="P7"><text:a xlink:type="simple" xlink:href="https://www.gnu.org/licenses/agpl-3.0.en.html" text:style-name="Internet_20_link" text:visited-style-name="Visited_20_Internet_20_Link">LICENSE</text:a></text:p>
        </text:list-item>
        <text:list-item>
          <text:p text:style-name="P7"><text:a xlink:type="simple" xlink:href="../../INSTALL.md" text:style-name="Internet_20_link" text:visited-style-name="Visited_20_Internet_20_Link">Installation</text:a></text:p>
        </text:list-item>
        <text:list-item>
          <text:p text:style-name="P7"><text:a xlink:type="simple" xlink:href="../../user_manual.md" text:style-name="Internet_20_link" text:visited-style-name="Visited_20_Internet_20_Link">User Manual</text:a></text:p>
        </text:list-item>
        <text:list-item>
          <text:p text:style-name="P7"><text:a xlink:type="simple" xlink:href="../../about.md" text:style-name="Internet_20_link" text:visited-style-name="Visited_20_Internet_20_Link">About</text:a></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5983b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AARCH64 LibreOffice_project/1f77d10d6938fd34972958f64b2bcfa54f8b1ba5</meta:generator>
    <meta:editing-cycles>2</meta:editing-cycles>
    <meta:editing-duration>PT8M56S</meta:editing-duration>
    <meta:keyword>status</meta:keyword>
    <meta:keyword>content manage</meta:keyword>
    <meta:keyword>ODT</meta:keyword>
    <meta:keyword>Markdown</meta:keyword>
    <meta:keyword>aggregation</meta:keyword>
    <dc:rights>Licensed under the GNU Affero General Public License version 3 or later</dc:rights>
    <dc:source>https://github.com/rsdoiel/antennaApp</dc:source>
    <dc:type>Documentation</dc:type>
    <dc:subject>Static Website Content Management</dc:subject>
    <dc:title>README for Antenna App</dc:title>
    <dc:date>2026-04-12T14:35:16.530250437</dc:date>
    <dc:creator>Robert Doiel</dc:creator>
    <meta:document-statistic meta:table-count="0" meta:image-count="0" meta:object-count="0" meta:page-count="3" meta:paragraph-count="43" meta:word-count="772" meta:character-count="4574" meta:non-whitespace-character-count="3872"/>
    <meta:user-defined meta:name="Date Modified">2026-04-12</meta:user-defined>
    <meta:user-defined meta:name="Date Published">2026-04-12</meta:user-defined>
    <meta:user-defined meta:name="Date created">2025-08-22</meta:user-defined>
  </office:meta>
</office:document-meta>
</file>