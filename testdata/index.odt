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b231" officeooo:paragraph-rsid="0010b231"/>
    </style:style>
    <style:style style:name="P2" style:family="paragraph" style:parent-style-name="Standard" style:list-style-name="L1">
      <style:text-properties officeooo:rsid="0010b231" officeooo:paragraph-rsid="0010b231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Exploring the Jumblies of Edward Lear</text:p>
      <text:p text:style-name="P1"/>
      <text:list text:style-name="L1">
        <text:list-item>
          <text:p text:style-name="P2">The Jumblies, an Edward Lear poem of whimsy</text:p>
        </text:list-item>
        <text:list-item>
          <text:p text:style-name="P2">Please in the poem</text:p>
        </text:list-item>
        <text:list-item>
          <text:p text:style-name="P2">About Edward Lear</text:p>
          <text:p text:style-name="P2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Robert Doiel</meta:initial-creator>
    <meta:creation-date>2026-04-11T12:24:44.869517200</meta:creation-date>
    <dc:date>2026-04-11T13:47:00.086857599</dc:date>
    <dc:creator>Robert Doiel</dc:creator>
    <meta:editing-duration>PT1H22M16S</meta:editing-duration>
    <meta:editing-cycles>1</meta:editing-cycles>
    <meta:generator>LibreOffice/26.2.2.2$Linux_AARCH64 LibreOffice_project/1f77d10d6938fd34972958f64b2bcfa54f8b1ba5</meta:generator>
    <meta:document-statistic meta:table-count="0" meta:image-count="0" meta:object-count="0" meta:page-count="1" meta:paragraph-count="5" meta:word-count="25" meta:character-count="119" meta:non-whitespace-character-count="102"/>
  </office:meta>
</office:document-meta>
</file>